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8af9" officeooo:paragraph-rsid="00008af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08af9" officeooo:paragraph-rsid="00008af9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0311e0" officeooo:paragraph-rsid="000311e0" style:font-weight-asian="normal" style:font-weight-complex="normal"/>
    </style:style>
    <style:style style:name="T1" style:family="text">
      <style:text-properties officeooo:rsid="0006761a"/>
    </style:style>
    <style:style style:name="T2" style:family="text">
      <style:text-properties officeooo:rsid="00012d8c"/>
    </style:style>
    <style:style style:name="T3" style:family="text">
      <style:text-properties officeooo:rsid="0003e4ce"/>
    </style:style>
    <style:style style:name="T4" style:family="text">
      <style:text-properties officeooo:rsid="00041ba6"/>
    </style:style>
    <style:style style:name="T5" style:family="text">
      <style:text-properties officeooo:rsid="0001a350"/>
    </style:style>
    <style:style style:name="T6" style:family="text">
      <style:text-properties officeooo:rsid="000311e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овое задание на многопоточность <text:span text:style-name="T1">(С++)</text:span></text:p>
      <text:p text:style-name="P2"/>
      <text:p text:style-name="P2"><text:tab/>Необходимо разработать клиент-серверное приложение реализующее асинхронное выполнение команд на сервере по запросам клиента.</text:p>
      <text:p text:style-name="P2"><text:tab/>Для упрощения предлагается сделать одно приложение без сетевого обмена, <text:span text:style-name="T2">но архитектура должна </text:span><text:span text:style-name="T3">быть </text:span><text:span text:style-name="T2">такой, чтобы позволяла добавить сетевую прослойку не меняя API клиента и сервера.</text:span></text:p>
      <text:p text:style-name="P2"><text:tab/><text:span text:style-name="T2">Необходимо реализовать класс-сервер у которого есть API для выполнения </text:span><text:span text:style-name="T4">определённых </text:span><text:span text:style-name="T2">команд. Каждая команда выполняет обработку данных </text:span><text:span text:style-name="T5">присылаемых клиентом</text:span><text:span text:style-name="T2"> (</text:span><text:span text:style-name="T5">данные и их обработка </text:span><text:span text:style-name="T2">не име</text:span><text:span text:style-name="T5">ю</text:span><text:span text:style-name="T2">т значения), но длительность выполнения команд </text:span><text:span text:style-name="T4">зависит как минимум от типа команды</text:span><text:span text:style-name="T2">. Сервер должен принимать команды в асинхронном режиме от любого кол-ва клиентов. При этом каждый клиент может асинхронно отправлять запросы на выполнение команд (не дожидаясь исполнения ранее отправленных). Задача сервера обеспечить приём, выполнение команд и возврат результата клиенту.</text:span></text:p>
      <text:p text:style-name="P2"><text:tab/><text:span text:style-name="T6">В приложении должно создаваться несколько клиентов которые обращаются к классу-серверу для выполнения команд. Кол-во клиентов и команд задаётся аргументом командной строки. Задача клиента отправить команды и принять от сервера результат их выполнения. Каждый клиент в конце работы (после получения всех результатов) подсчитывает статистику времени выполнения команд — на собственное усмотрение.</text:span></text:p>
      <text:p text:style-name="P2"/>
      <text:p text:style-name="P2"><text:tab/><text:span text:style-name="T6">Основные требования к реализации:</text:span></text:p>
      <text:list text:style-name="L1">
        <text:list-item>
          <text:p text:style-name="P3">стандартный С++14;</text:p>
        </text:list-item>
        <text:list-item>
          <text:p text:style-name="P3">использование только STL, внешние библиотеки не допускаются;</text:p>
        </text:list-item>
        <text:list-item>
          <text:p text:style-name="P3">особое внимание уделить удобному API и читаемости приложения;</text:p>
        </text:list-item>
        <text:list-item>
          <text:p text:style-name="P3">не надо придумывать хитроумные конструкции и переусложнять код — важно продемонстрировать <text:span text:style-name="T3">умение писать легко читаемый и поддерживаемый код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5T20:42:42.108040128</meta:creation-date>
    <dc:date>2026-06-05T21:34:46.898090807</dc:date>
    <meta:editing-duration>PT41M45S</meta:editing-duration>
    <meta:editing-cycles>6</meta:editing-cycles>
    <meta:generator>LibreOffice/25.8.2.2$Linux_X86_64 LibreOffice_project/d401f2107ccab8f924a8e2df40f573aab7605b6f</meta:generator>
    <meta:document-statistic meta:table-count="0" meta:image-count="0" meta:object-count="0" meta:page-count="1" meta:paragraph-count="10" meta:word-count="206" meta:character-count="1615" meta:non-whitespace-character-count="1416"/>
  </office:meta>
</office:document-meta>
</file>