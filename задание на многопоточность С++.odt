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</office:automatic-styles>
  <office:body>
    <office:text text:use-soft-page-breaks="true">
      <text:p text:style-name="P1"/>
      <text:p text:style-name="P2"><text:tab/>Необходимо разработать клиент-серверное приложение реализующее асинхронное выполнение команд на сервере по запросам клиента.</text:p>
      <text:p text:style-name="P3"><text:tab/>Для упрощения предлагается сделать одно приложение без<text:s/>сетевого обмена, но архитектура должна быть такой, чтобы позволяла добавить сетевую прослойку не меняя API клиента и сервера.</text:p>
      <text:p text:style-name="P4"><text:tab/>Необходимо реализовать класс-сервер у которого есть API для выполнения определённых команд. Каждая команда выполняет обработку данных присылаемых клиентом (данные и их обработка не имеют значения), но длительность выполнения команд зависит как минимум от типа команды. Сервер должен принимать команды в асинхронном режиме от любого кол-ва клиентов. При этом каждый клиент может асинхронно отправлять запросы на выполнение команд (не дожидаясь исполнения ранее отправленных). Задача сервера обеспечить приём, выполнение команд и возврат результата клиенту.</text:p>
      <text:p text:style-name="P5"><text:tab/>В приложении должно создаваться несколько клиентов которые обращаются к классу-серверу для выполнения команд. Кол-во клиентов и команд задаётся аргументом командной строки. Задача клиента отправить команды и принять от сервера результат их выполнения. Каждый клиент в конце работы (после получения всех результатов) подсчитывает статистику времени выполнения команд — на собственное усмотрение.</text:p>
      <text:p text:style-name="P6"/>
      <text:p text:style-name="P7"><text:tab/>Основные требования к реализации:</text:p>
      <text:list text:style-name="LFO1" text:continue-numbering="true">
        <text:list-item>
          <text:p text:style-name="P8">стандартный С++14;</text:p>
        </text:list-item>
        <text:list-item>
          <text:p text:style-name="P9">использование только STL, внешние библиотеки не допускаются;</text:p>
        </text:list-item>
        <text:list-item>
          <text:p text:style-name="P10">особое внимание уделить удобному API и читаемости приложения;</text:p>
        </text:list-item>
        <text:list-item>
          <text:p text:style-name="P11">не надо придумывать хитроумные конструкции и переусложнять код — важно продемонстрировать умение писать легко читаемый и поддерживаемый код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limov Vladimir</dc:creator>
    <meta:creation-date>2026-06-05T20:42:00Z</meta:creation-date>
    <dc:date>2026-06-05T18:54:00Z</dc:date>
    <meta:template xlink:href="Normal.dotm" xlink:type="simple"/>
    <meta:editing-cycles>8</meta:editing-cycles>
    <meta:editing-duration>PT2460S</meta:editing-duration>
    <meta:document-statistic meta:page-count="1" meta:paragraph-count="3" meta:word-count="235" meta:character-count="1578" meta:row-count="11" meta:non-whitespace-character-count="1346"/>
  </office:meta>
</office:document-meta>
</file>